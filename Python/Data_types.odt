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56000003003816ABB6D89983AD.png" manifest:media-type="image/png"/>
  <manifest:file-entry manifest:full-path="Pictures/1000000000000556000003006A263B622AF88EF4.png" manifest:media-type="image/png"/>
  <manifest:file-entry manifest:full-path="Pictures/1000000000000556000003008593ED50523DD12B.png" manifest:media-type="image/png"/>
  <manifest:file-entry manifest:full-path="Pictures/100000000000055600000300F07A8FBA40B27718.png" manifest:media-type="image/png"/>
  <manifest:file-entry manifest:full-path="Pictures/1000000000000556000003001935C37DCD48D01E.png" manifest:media-type="image/png"/>
  <manifest:file-entry manifest:full-path="Pictures/1000000000000556000003000A9517741A8F8B9C.png" manifest:media-type="image/png"/>
  <manifest:file-entry manifest:full-path="Pictures/100000000000055600000300CEA76F9AD4A08E36.png" manifest:media-type="image/png"/>
  <manifest:file-entry manifest:full-path="Pictures/100000000000055600000300C4755A8DB37A301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563cm, 6.708cm, 3.829cm, 11.90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57cm, 6.877cm, 5.105cm, 12.38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087cm, 6.99cm, 4.849cm, 11.82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124cm, 7.047cm, 5.212cm, 11.84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903cm, 6.877cm, 4.083cm, 11.59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06cm, 6.877cm, 5.219cm, 11.98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366cm, 6.989cm, 10.169cm, 11.71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48cm, 6.428cm, 4.8cm, 12.2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8" draw:name="Figura1" text:anchor-type="char" svg:x="-1.801cm" svg:y="-0.697cm" svg:width="20.324cm" svg:height="13.986cm" draw:z-index="0"><draw:image xlink:href="Pictures/1000000000000556000003003816ABB6D89983AD.png" xlink:type="simple" xlink:show="embed" xlink:actuate="onLoad" draw:mime-type="image/png"/></draw:frame></text:p>
      <text:p text:style-name="Standard"><draw:frame draw:style-name="fr7" draw:name="Figura2" text:anchor-type="char" svg:x="-1.815cm" svg:y="0.009cm" svg:width="19.957cm" svg:height="5.475cm" draw:z-index="1"><draw:image xlink:href="Pictures/1000000000000556000003006A263B622AF88EF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Figura3" text:anchor-type="char" svg:x="-1.845cm" svg:y="-1.117cm" svg:width="20.348cm" svg:height="14.176cm" draw:z-index="2"><draw:image xlink:href="Pictures/1000000000000556000003001935C37DCD48D01E.png" xlink:type="simple" xlink:show="embed" xlink:actuate="onLoad" draw:mime-type="image/png"/></draw:frame><draw:frame draw:style-name="fr5" draw:name="Figura4" text:anchor-type="char" svg:x="-0.972cm" svg:y="12.843cm" svg:width="19.263cm" svg:height="14.533cm" draw:z-index="3"><draw:image xlink:href="Pictures/1000000000000556000003000A9517741A8F8B9C.png" xlink:type="simple" xlink:show="embed" xlink:actuate="onLoad" draw:mime-type="image/png"/></draw:frame><text:soft-page-break/></text:p>
      <text:p text:style-name="Standard"/>
      <text:p text:style-name="Standard"><draw:frame draw:style-name="fr4" draw:name="Figura5" text:anchor-type="char" svg:x="-1.369cm" svg:y="0.369cm" svg:width="18.232cm" svg:height="12.663cm" draw:z-index="4"><draw:image xlink:href="Pictures/100000000000055600000300C4755A8DB37A301A.png" xlink:type="simple" xlink:show="embed" xlink:actuate="onLoad" draw:mime-type="image/png"/></draw:frame><draw:frame draw:style-name="fr3" draw:name="Figura6" text:anchor-type="char" svg:x="-0.866cm" svg:y="13.439cm" svg:width="18.734cm" svg:height="9.061cm" draw:z-index="5"><draw:image xlink:href="Pictures/100000000000055600000300F07A8FBA40B27718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Figura7" text:anchor-type="char" svg:x="-1.263cm" svg:y="0.086cm" svg:width="19.369cm" svg:height="13.358cm" draw:z-index="6"><draw:image xlink:href="Pictures/100000000000055600000300CEA76F9AD4A08E36.png" xlink:type="simple" xlink:show="embed" xlink:actuate="onLoad" draw:mime-type="image/png"/></draw:frame><draw:frame draw:style-name="fr1" draw:name="Figura8" text:anchor-type="char" svg:x="-0.337cm" svg:y="13.734cm" svg:width="18.337cm" svg:height="12.472cm" draw:z-index="7"><draw:image xlink:href="Pictures/1000000000000556000003008593ED50523DD12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2T18:20:26.640000000</meta:creation-date>
    <dc:date>2024-01-02T18:39:15.319000000</dc:date>
    <meta:editing-duration>PT18M50S</meta:editing-duration>
    <meta:editing-cycles>2</meta:editing-cycles>
    <meta:generator>LibreOffice/7.6.2.1$Windows_X86_64 LibreOffice_project/56f7684011345957bbf33a7ee678afaf4d2ba333</meta:generator>
    <meta:document-statistic meta:table-count="0" meta:image-count="8" meta:object-count="0" meta:page-count="4" meta:paragraph-count="0" meta:word-count="0" meta:character-count="0" meta:non-whitespace-character-count="0"/>
  </office:meta>
</office:document-meta>
</file>